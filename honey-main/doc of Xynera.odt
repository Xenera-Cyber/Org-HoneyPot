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59a4e" officeooo:paragraph-rsid="00159a4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Standard">
      <style:text-properties officeooo:rsid="00159a4e" officeooo:paragraph-rsid="00159a4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🐝 Xynera – Honey for Hackers</text:h>
      <text:h text:style-name="Heading_20_2" text:outline-level="2">Ultra-Detailed Current Implementation Documentation (Strictly Present State)</text:h>
      <text:p text:style-name="Horizontal_20_Line"/>
      <text:h text:style-name="Heading_20_1" text:outline-level="1">1. Project Identity</text:h>
      <text:p text:style-name="Text_20_body"><text:span text:style-name="Strong_20_Emphasis">Company:</text:span> Xynera<text:line-break/><text:span text:style-name="Strong_20_Emphasis">Product:</text:span> Honey for Hackers<text:line-break/><text:span text:style-name="Strong_20_Emphasis">Type:</text:span> AI-Integrated Honeypot System</text:p>
      <text:p text:style-name="Horizontal_20_Line"/>
      <text:h text:style-name="Heading_20_1" text:outline-level="1">2. Current Objective (Strict Scope)</text:h>
      <text:p text:style-name="Text_20_body">The system currently achieves:</text:p>
      <text:list text:style-name="L1">
        <text:list-item>
          <text:p text:style-name="P4">Capturing attacker commands from honeypot (Cowrie)</text:p>
        </text:list-item>
        <text:list-item>
          <text:p text:style-name="P4">Forwarding commands to AI backend</text:p>
        </text:list-item>
        <text:list-item>
          <text:p text:style-name="P4">Processing commands using COE AI API</text:p>
        </text:list-item>
        <text:list-item>
          <text:p text:style-name="P4">Generating terminal-like responses</text:p>
        </text:list-item>
        <text:list-item>
          <text:p text:style-name="P4">Returning responses back into interaction loop</text:p>
        </text:list-item>
        <text:list-item>
          <text:p text:style-name="P4">Manual testing of full pipeline</text:p>
        </text:list-item>
      </text:list>
      <text:p text:style-name="Text_20_body">⚠️ NOTE: No assumptions beyond this are included.</text:p>
      <text:p text:style-name="Horizontal_20_Line"/>
      <text:h text:style-name="Heading_20_1" text:outline-level="1">3. Lab Setup (Actual Working Environment)</text:h>
      <text:h text:style-name="Heading_20_2" text:outline-level="2">3.1 Host Machine</text:h>
      <text:list text:style-name="L2">
        <text:list-item>
          <text:p text:style-name="P5">Device: HP Victus 15-fa0xxx</text:p>
        </text:list-item>
        <text:list-item>
          <text:p text:style-name="P5">OS: Ubuntu 24.04.4 LTS</text:p>
        </text:list-item>
        <text:list-item>
          <text:p text:style-name="P5">Kernel: 6.17.x</text:p>
        </text:list-item>
        <text:list-item>
          <text:p text:style-name="P5">RAM: 16 GB</text:p>
        </text:list-item>
        <text:list-item>
          <text:p text:style-name="P5">CPU: Intel i7-12650H</text:p>
        </text:list-item>
        <text:list-item>
          <text:p text:style-name="P5">GPU: RTX 3050 + Integrated</text:p>
        </text:list-item>
        <text:list-item>
          <text:p text:style-name="P5">Storage: 1 TB SSD</text:p>
        </text:list-item>
      </text:list>
      <text:h text:style-name="Heading_20_2" text:outline-level="2"><text:soft-page-break/>3.2 Runtime Behavior</text:h>
      <text:p text:style-name="Text_20_body">Current setup is <text:span text:style-name="Strong_20_Emphasis">single-machine local lab</text:span>:</text:p>
      <text:list text:style-name="L3">
        <text:list-item>
          <text:p text:style-name="P6">Honeypot → running locally</text:p>
        </text:list-item>
        <text:list-item>
          <text:p text:style-name="P6">AI Backend → running locally</text:p>
        </text:list-item>
        <text:list-item>
          <text:p text:style-name="P6">Communication → localhost (127.0.0.1)</text:p>
        </text:list-item>
      </text:list>
      <text:p text:style-name="Text_20_body">No distributed deployment yet.</text:p>
      <text:p text:style-name="Horizontal_20_Line"/>
      <text:h text:style-name="Heading_20_1" text:outline-level="1">4. End-to-End System Flow</text:h>
      <text:p text:style-name="Preformatted_20_Text"><text:span text:style-name="Source_20_Text">[Attacker]</text:span></text:p>
      <text:p text:style-name="Preformatted_20_Text"><text:span text:style-name="Source_20_Text"><text:s text:c="4"/>|</text:span></text:p>
      <text:p text:style-name="Preformatted_20_Text"><text:span text:style-name="Source_20_Text"><text:s text:c="4"/>v</text:span></text:p>
      <text:p text:style-name="Preformatted_20_Text"><text:span text:style-name="Source_20_Text">[SSH Session - Cowrie]</text:span></text:p>
      <text:p text:style-name="Preformatted_20_Text"><text:span text:style-name="Source_20_Text"><text:s text:c="4"/>|</text:span></text:p>
      <text:p text:style-name="Preformatted_20_Text"><text:span text:style-name="Source_20_Text"><text:s text:c="4"/>v</text:span></text:p>
      <text:p text:style-name="Preformatted_20_Text"><text:span text:style-name="Source_20_Text">[Command Captured]</text:span></text:p>
      <text:p text:style-name="Preformatted_20_Text"><text:span text:style-name="Source_20_Text"><text:s text:c="4"/>|</text:span></text:p>
      <text:p text:style-name="Preformatted_20_Text"><text:span text:style-name="Source_20_Text"><text:s text:c="4"/>v</text:span></text:p>
      <text:p text:style-name="Preformatted_20_Text"><text:span text:style-name="Source_20_Text">[Forward to Backend API]</text:span></text:p>
      <text:p text:style-name="Preformatted_20_Text"><text:span text:style-name="Source_20_Text"><text:s text:c="4"/>|</text:span></text:p>
      <text:p text:style-name="Preformatted_20_Text"><text:span text:style-name="Source_20_Text"><text:s text:c="4"/>v</text:span></text:p>
      <text:p text:style-name="Preformatted_20_Text"><text:span text:style-name="Source_20_Text">[Flask Server]</text:span></text:p>
      <text:p text:style-name="Preformatted_20_Text"><text:span text:style-name="Source_20_Text"><text:s text:c="4"/>|</text:span></text:p>
      <text:p text:style-name="Preformatted_20_Text"><text:span text:style-name="Source_20_Text"><text:s text:c="4"/>v</text:span></text:p>
      <text:p text:style-name="Preformatted_20_Text"><text:span text:style-name="Source_20_Text">[COE AI Request]</text:span></text:p>
      <text:p text:style-name="Preformatted_20_Text"><text:span text:style-name="Source_20_Text"><text:s text:c="4"/>|</text:span></text:p>
      <text:p text:style-name="Preformatted_20_Text"><text:span text:style-name="Source_20_Text"><text:s text:c="4"/>v</text:span></text:p>
      <text:p text:style-name="Preformatted_20_Text"><text:span text:style-name="Source_20_Text">[AI Response Generated]</text:span></text:p>
      <text:p text:style-name="Preformatted_20_Text"><text:span text:style-name="Source_20_Text"><text:s text:c="4"/>|</text:span></text:p>
      <text:p text:style-name="Preformatted_20_Text"><text:span text:style-name="Source_20_Text"><text:s text:c="4"/>v</text:span></text:p>
      <text:p text:style-name="Preformatted_20_Text"><text:span text:style-name="Source_20_Text">[Return to Flask]</text:span></text:p>
      <text:p text:style-name="Preformatted_20_Text"><text:span text:style-name="Source_20_Text"><text:s text:c="4"/>|</text:span></text:p>
      <text:p text:style-name="Preformatted_20_Text"><text:span text:style-name="Source_20_Text"><text:s text:c="4"/>v</text:span></text:p>
      <text:p text:style-name="Preformatted_20_Text"><text:span text:style-name="Source_20_Text">[Send Back to Honeypot]</text:span></text:p>
      <text:p text:style-name="Preformatted_20_Text"><text:span text:style-name="Source_20_Text"><text:s text:c="4"/>|</text:span></text:p>
      <text:p text:style-name="Preformatted_20_Text"><text:span text:style-name="Source_20_Text"><text:s text:c="4"/>v</text:span></text:p>
      <text:p text:style-name="P2"><text:span text:style-name="Source_20_Text">[Displayed to Attacker]</text:span></text:p>
      <text:p text:style-name="Horizontal_20_Line"/>
      <text:h text:style-name="Heading_20_1" text:outline-level="1">5. Honeypot Layer (Cowrie)</text:h>
      <text:h text:style-name="Heading_20_2" text:outline-level="2">5.1 Role</text:h>
      <text:list text:style-name="L4">
        <text:list-item>
          <text:p text:style-name="P7">Accept SSH connections</text:p>
        </text:list-item>
        <text:list-item>
          <text:p text:style-name="P7">Simulate Linux shell</text:p>
        </text:list-item>
        <text:list-item>
          <text:p text:style-name="P7">Capture attacker input commands</text:p>
        </text:list-item>
      </text:list>
      <text:h text:style-name="Heading_20_2" text:outline-level="2"><text:soft-page-break/>5.2 Current Integration Behavior</text:h>
      <text:list text:style-name="L5">
        <text:list-item>
          <text:p text:style-name="P8">Commands are intercepted</text:p>
        </text:list-item>
        <text:list-item>
          <text:p text:style-name="P8">Forwarded externally (manual/logic-based integration)</text:p>
        </text:list-item>
        <text:list-item>
          <text:p text:style-name="P8">No internal modification of Cowrie core yet (light integration stage)</text:p>
        </text:list-item>
      </text:list>
      <text:h text:style-name="Heading_20_2" text:outline-level="2">5.3 Observations</text:h>
      <text:list text:style-name="L6">
        <text:list-item>
          <text:p text:style-name="P9">Cowrie successfully logs commands</text:p>
        </text:list-item>
        <text:list-item>
          <text:p text:style-name="P9">Interaction is real-time enough for testing</text:p>
        </text:list-item>
      </text:list>
      <text:p text:style-name="Horizontal_20_Line"/>
      <text:h text:style-name="Heading_20_1" text:outline-level="1">6. AI Backend (Xynera-AI)</text:h>
      <text:h text:style-name="Heading_20_2" text:outline-level="2">6.1 Core Stack</text:h>
      <text:list text:style-name="L7">
        <text:list-item>
          <text:p text:style-name="P10">Python 3</text:p>
        </text:list-item>
        <text:list-item>
          <text:p text:style-name="P10">Flask</text:p>
        </text:list-item>
      </text:list>
      <text:h text:style-name="Heading_20_2" text:outline-level="2">6.2 Main File</text:h>
      <text:list text:style-name="L8">
        <text:list-item>
          <text:p text:style-name="P11">app.py</text:p>
        </text:list-item>
      </text:list>
      <text:p text:style-name="Horizontal_20_Line"/>
      <text:h text:style-name="Heading_20_1" text:outline-level="1">7. API Design (Detailed)</text:h>
      <text:h text:style-name="Heading_20_2" text:outline-level="2">Endpoint</text:h>
      <text:p text:style-name="P2"><text:span text:style-name="Source_20_Text">POST /process</text:span></text:p>
      <text:h text:style-name="Heading_20_2" text:outline-level="2">Request Schema</text:h>
      <text:p text:style-name="Preformatted_20_Text"><text:span text:style-name="Source_20_Text">{</text:span></text:p>
      <text:p text:style-name="Preformatted_20_Text"><text:span text:style-name="Source_20_Text"><text:s text:c="2"/>"ip": "string",</text:span></text:p>
      <text:p text:style-name="Preformatted_20_Text"><text:span text:style-name="Source_20_Text"><text:s text:c="2"/>"command": "string"</text:span></text:p>
      <text:p text:style-name="P2"><text:span text:style-name="Source_20_Text">}</text:span></text:p>
      <text:h text:style-name="Heading_20_3" text:outline-level="3">Field Details</text:h>
      <text:list text:style-name="L9">
        <text:list-item>
          <text:p text:style-name="P12">ip → attacker IP (currently passed manually or from honeypot)</text:p>
        </text:list-item>
        <text:list-item>
          <text:p text:style-name="P12">command → raw command entered by attacker</text:p>
        </text:list-item>
      </text:list>
      <text:p text:style-name="Horizontal_20_Line"/>
      <text:h text:style-name="Heading_20_2" text:outline-level="2"><text:soft-page-break/>Response Schema</text:h>
      <text:p text:style-name="Preformatted_20_Text"><text:span text:style-name="Source_20_Text">{</text:span></text:p>
      <text:p text:style-name="Preformatted_20_Text"><text:span text:style-name="Source_20_Text"><text:s text:c="2"/>"response": "string"</text:span></text:p>
      <text:p text:style-name="P2"><text:span text:style-name="Source_20_Text">}</text:span></text:p>
      <text:p text:style-name="Horizontal_20_Line"/>
      <text:h text:style-name="Heading_20_1" text:outline-level="1">8. Backend Execution Flow (Detailed)</text:h>
      <text:p text:style-name="Preformatted_20_Text"><text:span text:style-name="Source_20_Text">Flask receives request</text:span></text:p>
      <text:p text:style-name="Preformatted_20_Text"><text:span text:style-name="Source_20_Text"><text:s text:c="8"/>|</text:span></text:p>
      <text:p text:style-name="Preformatted_20_Text"><text:span text:style-name="Source_20_Text"><text:s text:c="8"/>v</text:span></text:p>
      <text:p text:style-name="Preformatted_20_Text"><text:span text:style-name="Source_20_Text">JSON parsing</text:span></text:p>
      <text:p text:style-name="Preformatted_20_Text"><text:span text:style-name="Source_20_Text"><text:s text:c="8"/>|</text:span></text:p>
      <text:p text:style-name="Preformatted_20_Text"><text:span text:style-name="Source_20_Text"><text:s text:c="8"/>v</text:span></text:p>
      <text:p text:style-name="Preformatted_20_Text"><text:span text:style-name="Source_20_Text">Extract IP + Command</text:span></text:p>
      <text:p text:style-name="Preformatted_20_Text"><text:span text:style-name="Source_20_Text"><text:s text:c="8"/>|</text:span></text:p>
      <text:p text:style-name="Preformatted_20_Text"><text:span text:style-name="Source_20_Text"><text:s text:c="8"/>v</text:span></text:p>
      <text:p text:style-name="Preformatted_20_Text"><text:span text:style-name="Source_20_Text">Validate input (basic level)</text:span></text:p>
      <text:p text:style-name="Preformatted_20_Text"><text:span text:style-name="Source_20_Text"><text:s text:c="8"/>|</text:span></text:p>
      <text:p text:style-name="Preformatted_20_Text"><text:span text:style-name="Source_20_Text"><text:s text:c="8"/>v</text:span></text:p>
      <text:p text:style-name="Preformatted_20_Text"><text:span text:style-name="Source_20_Text">Send command to COE AI</text:span></text:p>
      <text:p text:style-name="Preformatted_20_Text"><text:span text:style-name="Source_20_Text"><text:s text:c="8"/>|</text:span></text:p>
      <text:p text:style-name="Preformatted_20_Text"><text:span text:style-name="Source_20_Text"><text:s text:c="8"/>v</text:span></text:p>
      <text:p text:style-name="Preformatted_20_Text"><text:span text:style-name="Source_20_Text">Wait for AI response</text:span></text:p>
      <text:p text:style-name="Preformatted_20_Text"><text:span text:style-name="Source_20_Text"><text:s text:c="8"/>|</text:span></text:p>
      <text:p text:style-name="Preformatted_20_Text"><text:span text:style-name="Source_20_Text"><text:s text:c="8"/>v</text:span></text:p>
      <text:p text:style-name="Preformatted_20_Text"><text:span text:style-name="Source_20_Text">Extract generated text</text:span></text:p>
      <text:p text:style-name="Preformatted_20_Text"><text:span text:style-name="Source_20_Text"><text:s text:c="8"/>|</text:span></text:p>
      <text:p text:style-name="Preformatted_20_Text"><text:span text:style-name="Source_20_Text"><text:s text:c="8"/>v</text:span></text:p>
      <text:p text:style-name="P2"><text:span text:style-name="Source_20_Text">Return JSON response</text:span></text:p>
      <text:p text:style-name="Horizontal_20_Line"/>
      <text:h text:style-name="Heading_20_1" text:outline-level="1">9. Internal Logic Breakdown</text:h>
      <text:h text:style-name="Heading_20_2" text:outline-level="2">9.1 Request Handling</text:h>
      <text:list text:style-name="L10">
        <text:list-item>
          <text:p text:style-name="P13">Flask route listens on /process</text:p>
        </text:list-item>
        <text:list-item>
          <text:p text:style-name="P13">Accepts POST only</text:p>
        </text:list-item>
        <text:list-item>
          <text:p text:style-name="P13">Content-Type: application/json</text:p>
        </text:list-item>
      </text:list>
      <text:h text:style-name="Heading_20_2" text:outline-level="2">9.2 Parsing</text:h>
      <text:list text:style-name="L11">
        <text:list-item>
          <text:p text:style-name="P14">request.json used</text:p>
        </text:list-item>
        <text:list-item>
          <text:p text:style-name="P14">No strict schema validation implemented yet</text:p>
        </text:list-item>
      </text:list>
      <text:h text:style-name="Heading_20_2" text:outline-level="2">9.3 AI Interaction</text:h>
      <text:list text:style-name="L12">
        <text:list-item>
          <text:p text:style-name="P15">Command forwarded directly</text:p>
        </text:list-item>
        <text:list-item>
          <text:p text:style-name="P15"><text:soft-page-break/>No preprocessing / filtering</text:p>
        </text:list-item>
        <text:list-item>
          <text:p text:style-name="P15">No context memory</text:p>
        </text:list-item>
      </text:list>
      <text:h text:style-name="Heading_20_2" text:outline-level="2">9.4 Response Handling</text:h>
      <text:list text:style-name="L13">
        <text:list-item>
          <text:p text:style-name="P16">AI output treated as final response</text:p>
        </text:list-item>
        <text:list-item>
          <text:p text:style-name="P16">No formatting layer</text:p>
        </text:list-item>
      </text:list>
      <text:p text:style-name="Horizontal_20_Line"/>
      <text:h text:style-name="Heading_20_1" text:outline-level="1">10. Example Execution (Realistic)</text:h>
      <text:h text:style-name="Heading_20_2" text:outline-level="2">Input</text:h>
      <text:p text:style-name="P2"><text:span text:style-name="Source_20_Text">command: ls</text:span></text:p>
      <text:h text:style-name="Heading_20_2" text:outline-level="2">Internal Steps</text:h>
      <text:list text:style-name="L14">
        <text:list-item>
          <text:p text:style-name="P17">Received by Flask</text:p>
        </text:list-item>
        <text:list-item>
          <text:p text:style-name="P17">Forwarded to AI</text:p>
        </text:list-item>
        <text:list-item>
          <text:p text:style-name="P17">AI generates directory listing</text:p>
        </text:list-item>
      </text:list>
      <text:h text:style-name="Heading_20_2" text:outline-level="2">Output</text:h>
      <text:p text:style-name="Preformatted_20_Text"><text:span text:style-name="Source_20_Text">file1.txt</text:span></text:p>
      <text:p text:style-name="Preformatted_20_Text"><text:span text:style-name="Source_20_Text">config.json</text:span></text:p>
      <text:p text:style-name="P2"><text:span text:style-name="Source_20_Text">logs/</text:span></text:p>
      <text:p text:style-name="Horizontal_20_Line"/>
      <text:h text:style-name="Heading_20_1" text:outline-level="1">11. CURL Testing (Ground Truth)</text:h>
      <text:p text:style-name="Preformatted_20_Text"><text:span text:style-name="Source_20_Text">curl -X POST http://localhost:5000/process \\</text:span></text:p>
      <text:p text:style-name="Preformatted_20_Text"><text:span text:style-name="Source_20_Text">-H "Content-Type: application/json" \\</text:span></text:p>
      <text:p text:style-name="P2"><text:span text:style-name="Source_20_Text">-d '{"ip":"10.200.200.10","command":"ps"}'</text:span></text:p>
      <text:h text:style-name="Heading_20_2" text:outline-level="2">Observed Behavior</text:h>
      <text:list text:style-name="L15">
        <text:list-item>
          <text:p text:style-name="P18">API reachable</text:p>
        </text:list-item>
        <text:list-item>
          <text:p text:style-name="P18">Response returned successfully</text:p>
        </text:list-item>
        <text:list-item>
          <text:p text:style-name="P18">Handles simple commands</text:p>
        </text:list-item>
      </text:list>
      <text:p text:style-name="Horizontal_20_Line"/>
      <text:h text:style-name="Heading_20_1" text:outline-level="1"><text:soft-page-break/>12. Directory Structure (Current State)</text:h>
      <text:p text:style-name="Preformatted_20_Text"><text:span text:style-name="Source_20_Text">xynera-ai/</text:span></text:p>
      <text:p text:style-name="Preformatted_20_Text"><text:span text:style-name="Source_20_Text">│</text:span></text:p>
      <text:p text:style-name="Preformatted_20_Text"><text:span text:style-name="Source_20_Text">├── app.py <text:s text:c="13"/># Flask server</text:span></text:p>
      <text:p text:style-name="Preformatted_20_Text"><text:span text:style-name="Source_20_Text">├── requirements.txt <text:s text:c="2"/># dependencies</text:span></text:p>
      <text:p text:style-name="P2"><text:span text:style-name="Source_20_Text">├── venv/ <text:s text:c="13"/># virtual environment</text:span></text:p>
      <text:p text:style-name="Horizontal_20_Line"/>
      <text:h text:style-name="Heading_20_1" text:outline-level="1">13. Execution Steps (Exact Working Flow)</text:h>
      <text:h text:style-name="Heading_20_2" text:outline-level="2">Start Backend</text:h>
      <text:p text:style-name="Preformatted_20_Text"><text:span text:style-name="Source_20_Text">cd xynera-ai</text:span></text:p>
      <text:p text:style-name="Preformatted_20_Text"><text:span text:style-name="Source_20_Text">python3 -m venv venv</text:span></text:p>
      <text:p text:style-name="Preformatted_20_Text"><text:span text:style-name="Source_20_Text">source venv/bin/activate</text:span></text:p>
      <text:p text:style-name="Preformatted_20_Text"><text:span text:style-name="Source_20_Text">pip install -r requirements.txt</text:span></text:p>
      <text:p text:style-name="P2"><text:span text:style-name="Source_20_Text">python3 app.py</text:span></text:p>
      <text:h text:style-name="Heading_20_2" text:outline-level="2">Send Request</text:h>
      <text:p text:style-name="P2"><text:span text:style-name="Source_20_Text">curl POST /process</text:span></text:p>
      <text:p text:style-name="Horizontal_20_Line"/>
      <text:h text:style-name="Heading_20_1" text:outline-level="1">14. Data Flow Characteristics</text:h>
      <text:h text:style-name="Heading_20_2" text:outline-level="2">Nature of Data</text:h>
      <text:list text:style-name="L16">
        <text:list-item>
          <text:p text:style-name="P19">Input: raw attacker commands</text:p>
        </text:list-item>
        <text:list-item>
          <text:p text:style-name="P19">Output: AI-generated text</text:p>
        </text:list-item>
      </text:list>
      <text:h text:style-name="Heading_20_2" text:outline-level="2">Processing Type</text:h>
      <text:list text:style-name="L17">
        <text:list-item>
          <text:p text:style-name="P20">Stateless</text:p>
        </text:list-item>
        <text:list-item>
          <text:p text:style-name="P20">One request → one response</text:p>
        </text:list-item>
      </text:list>
      <text:h text:style-name="Heading_20_2" text:outline-level="2">No Persistence</text:h>
      <text:list text:style-name="L18">
        <text:list-item>
          <text:p text:style-name="P21">No logs stored in DB</text:p>
        </text:list-item>
        <text:list-item>
          <text:p text:style-name="P21">No session tracking</text:p>
        </text:list-item>
      </text:list>
      <text:p text:style-name="Horizontal_20_Line"/>
      <text:h text:style-name="Heading_20_1" text:outline-level="1"><text:soft-page-break/>15. Edge Cases Observed</text:h>
      <text:list text:style-name="L19">
        <text:list-item>
          <text:p text:style-name="P22">Empty command → undefined behavior (depends on AI)</text:p>
        </text:list-item>
        <text:list-item>
          <text:p text:style-name="P22">Invalid JSON → Flask error</text:p>
        </text:list-item>
        <text:list-item>
          <text:p text:style-name="P22">Multi-line input → inconsistent handling</text:p>
        </text:list-item>
        <text:list-item>
          <text:p text:style-name="P22">Interrupted curl → no response</text:p>
        </text:list-item>
      </text:list>
      <text:p text:style-name="Horizontal_20_Line"/>
      <text:h text:style-name="Heading_20_1" text:outline-level="1">16. Timing Behavior</text:h>
      <text:list text:style-name="L20">
        <text:list-item>
          <text:p text:style-name="P23">Response latency depends on AI API</text:p>
        </text:list-item>
        <text:list-item>
          <text:p text:style-name="P23">No async handling</text:p>
        </text:list-item>
        <text:list-item>
          <text:p text:style-name="P23">Blocking request-response cycle</text:p>
        </text:list-item>
      </text:list>
      <text:p text:style-name="Horizontal_20_Line"/>
      <text:h text:style-name="Heading_20_1" text:outline-level="1">17. Error Handling (Current)</text:h>
      <text:list text:style-name="L21">
        <text:list-item>
          <text:p text:style-name="P24">Minimal / default Flask errors</text:p>
        </text:list-item>
        <text:list-item>
          <text:p text:style-name="P24">No custom error messages</text:p>
        </text:list-item>
        <text:list-item>
          <text:p text:style-name="P24">No retry logic</text:p>
        </text:list-item>
      </text:list>
      <text:p text:style-name="Horizontal_20_Line"/>
      <text:h text:style-name="Heading_20_1" text:outline-level="1">18. Security State (Current)</text:h>
      <text:list text:style-name="L22">
        <text:list-item>
          <text:p text:style-name="P25">No authentication on API</text:p>
        </text:list-item>
        <text:list-item>
          <text:p text:style-name="P25">No rate limiting</text:p>
        </text:list-item>
        <text:list-item>
          <text:p text:style-name="P25">No input sanitization</text:p>
        </text:list-item>
      </text:list>
      <text:p text:style-name="Horizontal_20_Line"/>
      <text:h text:style-name="Heading_20_1" text:outline-level="1">19. Current Capabilities Summary</text:h>
      <text:list text:style-name="L23">
        <text:list-item>
          <text:p text:style-name="P26">Functional pipeline</text:p>
        </text:list-item>
        <text:list-item>
          <text:p text:style-name="P26">AI response generation works</text:p>
        </text:list-item>
        <text:list-item>
          <text:p text:style-name="P26">Manual testing confirmed</text:p>
        </text:list-item>
        <text:list-item>
          <text:p text:style-name="P26">Basic integration with honeypot</text:p>
        </text:list-item>
      </text:list>
      <text:p text:style-name="Horizontal_20_Line"/>
      <text:h text:style-name="Heading_20_1" text:outline-level="1"><text:soft-page-break/>20. Strict Boundary (What is NOT implemented)</text:h>
      <text:list text:style-name="L24">
        <text:list-item>
          <text:p text:style-name="P27">No database</text:p>
        </text:list-item>
        <text:list-item>
          <text:p text:style-name="P27">No RAG</text:p>
        </text:list-item>
        <text:list-item>
          <text:p text:style-name="P27">No attack classification</text:p>
        </text:list-item>
        <text:list-item>
          <text:p text:style-name="P27">No deception profiles</text:p>
        </text:list-item>
        <text:list-item>
          <text:p text:style-name="P27">No automation</text:p>
        </text:list-item>
        <text:list-item>
          <text:p text:style-name="P27">No scaling</text:p>
        </text:list-item>
      </text:list>
      <text:p text:style-name="Horizontal_20_Line"/>
      <text:h text:style-name="Heading_20_1" text:outline-level="1">21. Final Summary</text:h>
      <text:p text:style-name="Text_20_body">System currently proves:</text:p>
      <text:p text:style-name="Text_20_body">✔ AI can generate believable shell responses<text:line-break/>✔ Honeypot → AI → Response loop works<text:line-break/>✔ Architecture is functional at base level</text:p>
      <text:p text:style-name="Text_20_body">This is a <text:span text:style-name="Strong_20_Emphasis">validated prototype stage</text:span>, not a production system.</text:p>
      <text:p text:style-name="Horizontal_20_Line"/>
      <text:h text:style-name="Heading_20_2" text:outline-level="2">END OF DOCUMENT</text:h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9T15:47:09.455680360</meta:creation-date>
    <dc:date>2026-03-19T15:56:36.641470650</dc:date>
    <meta:editing-duration>PT9M28S</meta:editing-duration>
    <meta:editing-cycles>1</meta:editing-cycles>
    <meta:document-statistic meta:table-count="0" meta:image-count="0" meta:object-count="0" meta:page-count="8" meta:paragraph-count="206" meta:word-count="740" meta:character-count="4596" meta:non-whitespace-character-count="3917"/>
    <meta:generator>LibreOffice/24.2.7.2$Linux_X86_64 LibreOffice_project/420$Build-2</meta:generator>
  </office:meta>
</office:document-meta>
</file>